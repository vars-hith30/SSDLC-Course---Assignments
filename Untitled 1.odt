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900000303B039E747AE5875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Heading_20_4">
      <style:text-properties fo:font-size="25pt" fo:font-weight="bold" style:font-size-asian="25pt" style:font-size-complex="25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officeooo:rsid="0006749c"/>
    </style:style>
    <style:style style:name="T3" style:family="text">
      <style:text-properties officeooo:rsid="00068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/>
      <text:h text:style-name="P3" text:outline-level="4"><text:span text:style-name="T3">G</text:span>enerated OWASP ZAP report and your detailed analysis:</text:h>
      <text:h text:style-name="P1" text:outline-level="4">Task A: Consolidate Vulnerability List &amp; Analysis </text:h>
      <text:p text:style-name="Text_20_body"><text:s/><text:span text:style-name="T2">The </text:span>list <text:span text:style-name="T2">of</text:span> critical, high, medium, and low-severity vulnerabilities <text:span text:style-name="T2">are:</text:span></text:p>
      <text:list xml:id="list3260998833" text:style-name="L1">
        <text:list-item>
          <text:p text:style-name="P5">Vulnerability List:</text:p>
          <text:list>
            <text:list-item>
              <text:p text:style-name="P4"><text:span text:style-name="T1">Critical:</text:span> 0</text:p>
            </text:list-item>
            <text:list-item>
              <text:p text:style-name="P4"><text:span text:style-name="T1">High:</text:span> 1</text:p>
              <text:list>
                <text:list-item>
                  <text:p text:style-name="P4">User Controllable HTML Element Attribute (Potential XSS).</text:p>
                </text:list-item>
              </text:list>
            </text:list-item>
            <text:list-item>
              <text:p text:style-name="P4"><text:span text:style-name="T1">Medium:</text:span> 0</text:p>
            </text:list-item>
            <text:list-item>
              <text:p text:style-name="P4"><text:span text:style-name="T1">Low:</text:span> 4 (See ZAP Report, generally Informational alerts are treated as Low/Informational).</text:p>
            </text:list-item>
          </text:list>
        </text:list-item>
        <text:list-item>
          <text:p text:style-name="P4"><text:span text:style-name="T1">Mitigation Plan for High-Severity Alert</text:span>:</text:p>
          <text:list>
            <text:list-item>
              <text:p text:style-name="P4"><text:span text:style-name="T1">Vulnerability:</text:span> User Controllable HTML Element Attribute.</text:p>
            </text:list-item>
            <text:list-item>
              <text:p text:style-name="P4"><text:span text:style-name="T1">Potential Impact</text:span>: If left unaddressed, this could allow an attacker to inject client-side scripts (XSS). Impact includes session hijacking, redirecting users to malicious sites, or unauthorized data extraction from the user's browser.</text:p>
            </text:list-item>
            <text:list-item>
              <text:p text:style-name="P4"><text:span text:style-name="T1">Mitigation</text:span>: The application must implement <text:span text:style-name="T1">output encoding</text:span> for all user-controlled data that is reflected back to the browser, specifically encoding values used in HTML element attributes. Alternatively, use a modern secure framework that handles output encoding by default.</text:p>
            </text:list-item>
          </text:list>
        </text:list-item>
      </text:list>
      <text:h text:style-name="P1" text:outline-level="4">Task B: Before-and-After Description </text:h>
      <text:p text:style-name="Text_20_body">Since you likely cannot fix the code and re-run ZAP immediately, you need to provide a detailed description of the mitigation:</text:p>
      <text:list xml:id="list3250363853" text:style-name="L2">
        <text:list-item>
          <text:p text:style-name="P6"><draw:frame draw:style-name="fr1" draw:name="Image1" text:anchor-type="char" svg:x="0.497cm" svg:y="1.009cm" svg:width="14.778cm" svg:height="9.423cm" draw:z-index="0"><draw:image xlink:href="Pictures/10000001000004B900000303B039E747AE5875B6.png" xlink:type="simple" xlink:show="embed" xlink:actuate="onLoad" draw:mime-type="image/png"/></draw:frame><text:soft-page-break/><text:span text:style-name="T1">Before Snapshot:</text:span> ZAP report's finding of the <text:span text:style-name="T1">High-severity XSS alert</text:span>.</text:p>
          <text:p text:style-name="P6"/>
        </text:list-item>
        <text:list-item>
          <text:p text:style-name="P6"><text:span text:style-name="T1">After Description:</text:span> The developer would modify the application code to implement robust <text:span text:style-name="T1">input validation</text:span> and <text:span text:style-name="T1">output encoding</text:span> to ensure user-supplied data cannot execute as code in the HTML element attribute. After the code fix, a re-scan would show the <text:span text:style-name="T1">Alerts count drop to 0 High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0:00:08.356658500</meta:creation-date>
    <dc:date>2025-10-13T00:14:30.943942452</dc:date>
    <meta:editing-duration>PT10M2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226" meta:character-count="1501" meta:non-whitespace-character-count="1302"/>
  </office:meta>
</office:document-meta>
</file>